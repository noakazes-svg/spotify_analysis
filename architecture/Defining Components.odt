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2068" officeooo:paragraph-rsid="0011dc35"/>
    </style:style>
    <style:style style:name="P2" style:family="paragraph" style:parent-style-name="Standard">
      <style:text-properties officeooo:rsid="00062068" officeooo:paragraph-rsid="00062068"/>
    </style:style>
    <style:style style:name="P3" style:family="paragraph" style:parent-style-name="Standard">
      <style:text-properties officeooo:rsid="00062068" officeooo:paragraph-rsid="0009949c"/>
    </style:style>
    <style:style style:name="P4" style:family="paragraph" style:parent-style-name="Standard">
      <style:text-properties officeooo:rsid="00062068" officeooo:paragraph-rsid="000b4f86"/>
    </style:style>
    <style:style style:name="P5" style:family="paragraph" style:parent-style-name="Standard">
      <style:text-properties officeooo:rsid="00062068" officeooo:paragraph-rsid="000815ce"/>
    </style:style>
    <style:style style:name="P6" style:family="paragraph" style:parent-style-name="Standard">
      <style:text-properties officeooo:rsid="00062068" officeooo:paragraph-rsid="00112eda"/>
    </style:style>
    <style:style style:name="P7" style:family="paragraph" style:parent-style-name="Standard">
      <style:text-properties officeooo:rsid="00062068" officeooo:paragraph-rsid="000c75e0"/>
    </style:style>
    <style:style style:name="P8" style:family="paragraph" style:parent-style-name="Standard">
      <style:text-properties officeooo:rsid="00062068" officeooo:paragraph-rsid="00199ece"/>
    </style:style>
    <style:style style:name="P9" style:family="paragraph" style:parent-style-name="Standard">
      <style:text-properties officeooo:rsid="00062068" officeooo:paragraph-rsid="0025ae64"/>
    </style:style>
    <style:style style:name="P10" style:family="paragraph" style:parent-style-name="Standard">
      <style:text-properties officeooo:rsid="00062068" officeooo:paragraph-rsid="00138969"/>
    </style:style>
    <style:style style:name="P11" style:family="paragraph" style:parent-style-name="Standard">
      <style:text-properties officeooo:rsid="00062068" officeooo:paragraph-rsid="00155a9e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1cee7a" officeooo:paragraph-rsid="001cee7a" style:font-weight-asian="bold" style:font-weight-complex="bold"/>
    </style:style>
    <style:style style:name="P13" style:family="paragraph" style:parent-style-name="Standard">
      <style:text-properties officeooo:rsid="00062068" officeooo:paragraph-rsid="0026848a"/>
    </style:style>
    <style:style style:name="P14" style:family="paragraph" style:parent-style-name="Standard">
      <style:text-properties officeooo:rsid="001cee7a" officeooo:paragraph-rsid="001cee7a"/>
    </style:style>
    <style:style style:name="P15" style:family="paragraph" style:parent-style-name="Standard">
      <style:text-properties officeooo:rsid="0023f5ae" officeooo:paragraph-rsid="0025ae64"/>
    </style:style>
    <style:style style:name="P16" style:family="paragraph" style:parent-style-name="Standard">
      <style:text-properties officeooo:rsid="0023f5ae" officeooo:paragraph-rsid="0023f5ae"/>
    </style:style>
    <style:style style:name="P17" style:family="paragraph" style:parent-style-name="Standard">
      <style:text-properties officeooo:rsid="00062068" officeooo:paragraph-rsid="0023f5ae"/>
    </style:style>
    <style:style style:name="P18" style:family="paragraph" style:parent-style-name="Standard">
      <style:text-properties officeooo:rsid="001cee7a" officeooo:paragraph-rsid="0025ae64"/>
    </style:style>
    <style:style style:name="P19" style:family="paragraph" style:parent-style-name="Standard">
      <style:text-properties officeooo:rsid="001cee7a" officeooo:paragraph-rsid="00284de2"/>
    </style:style>
    <style:style style:name="P20" style:family="paragraph" style:parent-style-name="Standard">
      <style:text-properties officeooo:rsid="001cee7a" officeooo:paragraph-rsid="0028e35a"/>
    </style:style>
    <style:style style:name="P21" style:family="paragraph" style:parent-style-name="Standard">
      <style:text-properties officeooo:rsid="001cee7a" officeooo:paragraph-rsid="0029dbae"/>
    </style:style>
    <style:style style:name="P22" style:family="paragraph" style:parent-style-name="Standard">
      <style:text-properties officeooo:rsid="0029dbae" officeooo:paragraph-rsid="0029dbae"/>
    </style:style>
    <style:style style:name="P23" style:family="paragraph" style:parent-style-name="Standard">
      <style:text-properties officeooo:rsid="0023f5ae" officeooo:paragraph-rsid="0029dbae"/>
    </style:style>
    <style:style style:name="T1" style:family="text">
      <style:text-properties style:text-underline-style="solid" style:text-underline-width="auto" style:text-underline-color="font-color" fo:font-weight="bold" officeooo:rsid="001cee7a" style:font-weight-asian="bold" style:font-weight-complex="bold"/>
    </style:style>
    <style:style style:name="T2" style:family="text">
      <style:text-properties officeooo:rsid="000815ce"/>
    </style:style>
    <style:style style:name="T3" style:family="text">
      <style:text-properties officeooo:rsid="00138969"/>
    </style:style>
    <style:style style:name="T4" style:family="text">
      <style:text-properties officeooo:rsid="000a9362" style:language-complex="he" style:country-complex="IL"/>
    </style:style>
    <style:style style:name="T5" style:family="text">
      <style:text-properties officeooo:rsid="00112eda" style:language-complex="he" style:country-complex="IL"/>
    </style:style>
    <style:style style:name="T6" style:family="text">
      <style:text-properties officeooo:rsid="000c75e0"/>
    </style:style>
    <style:style style:name="T7" style:family="text">
      <style:text-properties officeooo:rsid="00199ece"/>
    </style:style>
    <style:style style:name="T8" style:family="text">
      <style:text-properties officeooo:rsid="00199ece" style:language-complex="he" style:country-complex="IL"/>
    </style:style>
    <style:style style:name="T9" style:family="text">
      <style:text-properties officeooo:rsid="00138969" style:language-complex="he" style:country-complex="IL"/>
    </style:style>
    <style:style style:name="T10" style:family="text">
      <style:text-properties officeooo:rsid="00155a9e" style:language-complex="he" style:country-complex="IL"/>
    </style:style>
    <style:style style:name="T11" style:family="text">
      <style:text-properties officeooo:rsid="000815ce" style:language-complex="he" style:country-complex="IL"/>
    </style:style>
    <style:style style:name="T12" style:family="text">
      <style:text-properties style:language-complex="he" style:country-complex="IL"/>
    </style:style>
    <style:style style:name="T13" style:family="text">
      <style:text-properties officeooo:rsid="00174b1a" style:language-complex="he" style:country-complex="IL"/>
    </style:style>
    <style:style style:name="T14" style:family="text">
      <style:text-properties officeooo:rsid="0026848a"/>
    </style:style>
    <style:style style:name="T15" style:family="text">
      <style:text-properties officeooo:rsid="001cee7a"/>
    </style:style>
    <style:style style:name="T16" style:family="text">
      <style:text-properties officeooo:rsid="00062068"/>
    </style:style>
    <style:style style:name="T17" style:family="text">
      <style:text-properties officeooo:rsid="0023f5ae"/>
    </style:style>
    <style:style style:name="T18" style:family="text">
      <style:text-properties officeooo:rsid="0025ae64"/>
    </style:style>
    <style:style style:name="T19" style:family="text">
      <style:text-properties officeooo:rsid="00284de2"/>
    </style:style>
    <style:style style:name="T20" style:family="text">
      <style:text-properties officeooo:rsid="0026848a" style:language-complex="he" style:country-complex="IL"/>
    </style:style>
    <style:style style:name="T21" style:family="text">
      <style:text-properties officeooo:rsid="0029dbae"/>
    </style:style>
    <style:style style:name="T22" style:family="text">
      <style:text-properties officeooo:rsid="0029dbae" style:language-complex="he" style:country-complex="IL"/>
    </style:style>
    <style:style style:name="T23" style:family="text">
      <style:text-properties officeooo:rsid="002b6471"/>
    </style:style>
    <style:style style:name="T24" style:family="text">
      <style:text-properties officeooo:rsid="002b6471" style:language-complex="he" style:country-complex="I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HLD</text:span><text:line-break/><text:line-break/>Component name: <text:span text:style-name="T2">Spoti</text:span><text:span text:style-name="T3">f</text:span><text:span text:style-name="T2">y connector</text:span><text:line-break/>High level description: The component takes specific user information (Spotify login), extracts from Spotify the list of song titles, artist/band name, album name, release year, genre from his favorite songs list, and writes the list to the database into a table.</text:p>
      <text:p text:style-name="P2">Inputs: Username and password, or API KEY</text:p>
      <text:p text:style-name="P3">outputs: list of song names</text:p>
      <text:p text:style-name="P4">dependencies: Connecting to Spotifywebsite, connecting to <text:span text:style-name="T4">the </text:span>DB</text:p>
      <text:p text:style-name="P2"/>
      <text:p text:style-name="P2"/>
      <text:p text:style-name="P5">Component name: <text:span text:style-name="T2">Shironet connector</text:span><text:line-break/>High level description: The component receives data that identifies a specific song: song title, singer/band name, album name, release year, genre – <text:span text:style-name="T5">and </text:span>connects to the Shiront website and returns the lyrics.</text:p>
      <text:p text:style-name="P6">Inputs: <text:s/>song title, singer/band name, album name, release year, genre</text:p>
      <text:p text:style-name="P7">outputs: <text:s/>the lyrics <text:span text:style-name="T6">o</text:span>f <text:span text:style-name="T6">the</text:span> song</text:p>
      <text:p text:style-name="P2">dependencies: Connection to the Shiront website, connection to the DB</text:p>
      <text:p text:style-name="P2"/>
      <text:p text:style-name="P2"/>
      <text:p text:style-name="P8">Component name: <text:span text:style-name="T7">genius</text:span><text:span text:style-name="T2"> connector</text:span><text:line-break/>High level description: The component receives data that identifies a specific song: song title, singer/band name, album name, release year, genre – <text:span text:style-name="T5">and </text:span>connects to the <text:span text:style-name="T7">genius</text:span> website and returns the lyrics.</text:p>
      <text:p text:style-name="P6">Inputs: <text:s/>song title, singer/band name, album name, release year, genre</text:p>
      <text:p text:style-name="P7">outputs: the lyrics <text:span text:style-name="T6">o</text:span>f <text:span text:style-name="T6">the</text:span> song</text:p>
      <text:p text:style-name="P9">dependencies: Connection to the <text:span text:style-name="T8">genius</text:span> website, connection to the DB</text:p>
      <text:p text:style-name="P2"/>
      <text:p text:style-name="P2"/>
      <text:p text:style-name="P9">Component name: <text:span text:style-name="T2">R</text:span>outer<text:line-break/>High level description: The router receives information about one song, and chooses which of the two authors to direct the request to retrieve the lyrics - Spotify or <text:span text:style-name="T7">genius</text:span>.</text:p>
      <text:p text:style-name="P10">inputs: <text:s/>information about one song</text:p>
      <text:p text:style-name="P10">outputs: <text:s/>The name of the connector selected to perform the task.</text:p>
      <text:p text:style-name="P10">Dependencies: <text:s/><text:span text:style-name="T2">Main</text:span><text:span text:style-name="T9">, Connecting to connectors</text:span></text:p>
      <text:p text:style-name="P2"/>
      <text:p text:style-name="P2"/>
      <text:p text:style-name="P11">Component name: <text:span text:style-name="T2">Main</text:span><text:line-break/>High level description: <text:span text:style-name="T9">invokes </text:span><text:span text:style-name="T10">s</text:span><text:span text:style-name="T11">poti</text:span><text:span text:style-name="T9">f</text:span><text:span text:style-name="T11">y connector </text:span><text:span text:style-name="T10">with the </text:span><text:span text:style-name="T12">user information, </text:span><text:span text:style-name="T10">getting the songs data from the DB, send one song at a time to the router to get the lyrics</text:span></text:p>
      <text:p text:style-name="P11">inputs: <text:span text:style-name="T12">user information</text:span></text:p>
      <text:p text:style-name="P11">outputs: <text:span text:style-name="T10">lyrics </text:span><text:span text:style-name="T13">for all songs</text:span></text:p>
      <text:p text:style-name="P2">dependencies: Connection to DB, connection to router</text:p>
      <text:p text:style-name="P2"/>
      <text:p text:style-name="P2"/>
      <text:p text:style-name="P2"/>
      <text:p text:style-name="P2"/>
      <text:p text:style-name="P2"/>
      <text:p text:style-name="P2"/>
      <text:p text:style-name="P12"><text:soft-page-break/>LLD</text:p>
      <text:p text:style-name="P12"/>
      <text:p text:style-name="P13">Component name: <text:span text:style-name="T2">Spoti</text:span><text:span text:style-name="T3">f</text:span><text:span text:style-name="T2">y connector</text:span></text:p>
      <text:p text:style-name="P13"><text:span text:style-name="T14">Low</text:span> level description: <text:line-break/><text:span text:style-name="T15">flow:</text:span></text:p>
      <text:p text:style-name="P14">1. Getting login details from the user and connecting to their Spotify account</text:p>
      <text:p text:style-name="P14">2. Go to <text:span text:style-name="T12">liked</text:span> songs</text:p>
      <text:p text:style-name="P14">3. Copying song titles</text:p>
      <text:p text:style-name="P14">4. For each song getting: <text:s/><text:span text:style-name="T16">artist/band name, album name, release year, genre</text:span></text:p>
      <text:p text:style-name="P14">5. Recording all the data about the song to the database, the primary key will be the song name ID</text:p>
      <text:p text:style-name="P14"/>
      <text:p text:style-name="P14"/>
      <text:p text:style-name="P13">Component name: <text:span text:style-name="T2">Shironet connector</text:span></text:p>
      <text:p text:style-name="P13"><text:span text:style-name="T14">Low</text:span> level description:<text:line-break/><text:span text:style-name="T15">flow:<text:line-break/></text:span><text:span text:style-name="T17">1. <text:s/></text:span><text:span text:style-name="T18">R</text:span>eceives data that identifies a specific song: song title, singer/band name, album name, release year, genre</text:p>
      <text:p text:style-name="P15">2. <text:span text:style-name="T18">finding the song page in </text:span><text:span text:style-name="T16">Shiront website</text:span></text:p>
      <text:p text:style-name="P15">3. <text:span text:style-name="T15">Copying song </text:span><text:span text:style-name="T16">lyrics </text:span><text:span text:style-name="T18">to the db</text:span></text:p>
      <text:p text:style-name="P16"/>
      <text:p text:style-name="P17"/>
      <text:p text:style-name="P13">Component name: <text:span text:style-name="T7">genius</text:span><text:span text:style-name="T2"> connector</text:span><text:line-break/><text:span text:style-name="T14">Low</text:span> level description:</text:p>
      <text:p text:style-name="P18">flow:<text:line-break/><text:span text:style-name="T17">1. <text:s/></text:span><text:span text:style-name="T18">R</text:span><text:span text:style-name="T16">eceives data that identifies a specific song: song title, singer/band name, album name, release year, genre</text:span></text:p>
      <text:p text:style-name="P15">2. <text:span text:style-name="T18">finding the song page in </text:span><text:span text:style-name="T16">Shiront website</text:span></text:p>
      <text:p text:style-name="P15">3. <text:span text:style-name="T15">Copying song </text:span><text:span text:style-name="T16">lyrics </text:span><text:span text:style-name="T18">to the db</text:span></text:p>
      <text:p text:style-name="P17"/>
      <text:p text:style-name="P13">Component name: <text:span text:style-name="T2">R</text:span>outer<text:line-break/><text:span text:style-name="T14">Low</text:span> level description:</text:p>
      <text:p text:style-name="P13"/>
      <text:p text:style-name="P19">flow:<text:line-break/><text:span text:style-name="T17">1. </text:span><text:span text:style-name="T19">getting</text:span><text:span text:style-name="T16"> information about one song</text:span></text:p>
      <text:p text:style-name="P20"><text:span text:style-name="T19">2. </text:span><text:span text:style-name="T16">chooses which of the two </text:span><text:span text:style-name="T19">connectors will get the task- </text:span><text:span text:style-name="T16">Spotify or </text:span><text:span text:style-name="T7">genius</text:span><text:span text:style-name="T16">.</text:span></text:p>
      <text:p text:style-name="P17"/>
      <text:p text:style-name="P13">Component name: <text:span text:style-name="T2">Main</text:span><text:line-break/><text:span text:style-name="T20">Low</text:span><text:span text:style-name="T12"> level description:</text:span></text:p>
      <text:p text:style-name="P21">flow:<text:line-break/><text:span text:style-name="T17">1. </text:span>Getting login details from the user </text:p>
      <text:p text:style-name="P21"><text:span text:style-name="T21">2. Contact Spotify Connector </text:span><text:span text:style-name="T22">that </text:span>connecting to their Spotify account </text:p>
      <text:p text:style-name="P22">3. <text:span text:style-name="T10">getting the songs data from the DB<text:line-break/></text:span><text:span text:style-name="T12">3. </text:span><text:span text:style-name="T10">send one song at a time to the router to get the lyrics</text:span></text:p>
      <text:p text:style-name="P16">4. Record the lyrics of a specific song to the DB, <text:span text:style-name="T23">one</text:span><text:span text:style-name="T24"> song at a time</text:span></text:p>
      <text:p text:style-name="P23">5. <text:span text:style-name="T24">M</text:span><text:span text:style-name="T13">ake sure I received all the lyrics for all the songs and inform the user that the process was successful or failed, and how many songs the lyrics were found for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0T22:04:11.566390500</meta:creation-date>
    <dc:date>2026-05-11T11:28:29.322950700</dc:date>
    <meta:editing-duration>PT1H7M39S</meta:editing-duration>
    <meta:editing-cycles>17</meta:editing-cycles>
    <meta:generator>LibreOffice/25.2.7.2$Windows_X86_64 LibreOffice_project/5cbfd1ab6520636bb5f7b99185aa69bd7456825d</meta:generator>
    <meta:document-statistic meta:table-count="0" meta:image-count="0" meta:object-count="0" meta:page-count="2" meta:paragraph-count="45" meta:word-count="553" meta:character-count="3401" meta:non-whitespace-character-count="2878"/>
  </office:meta>
</office:document-meta>
</file>