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068" officeooo:paragraph-rsid="0011dc35"/>
    </style:style>
    <style:style style:name="P2" style:family="paragraph" style:parent-style-name="Standard">
      <style:text-properties officeooo:rsid="00062068" officeooo:paragraph-rsid="00062068"/>
    </style:style>
    <style:style style:name="P3" style:family="paragraph" style:parent-style-name="Standard">
      <style:text-properties officeooo:rsid="00062068" officeooo:paragraph-rsid="0009949c"/>
    </style:style>
    <style:style style:name="P4" style:family="paragraph" style:parent-style-name="Standard">
      <style:text-properties officeooo:rsid="00062068" officeooo:paragraph-rsid="000b4f86"/>
    </style:style>
    <style:style style:name="P5" style:family="paragraph" style:parent-style-name="Standard">
      <style:text-properties officeooo:rsid="00062068" officeooo:paragraph-rsid="000815ce"/>
    </style:style>
    <style:style style:name="P6" style:family="paragraph" style:parent-style-name="Standard">
      <style:text-properties officeooo:rsid="00062068" officeooo:paragraph-rsid="00112eda"/>
    </style:style>
    <style:style style:name="P7" style:family="paragraph" style:parent-style-name="Standard">
      <style:text-properties officeooo:rsid="00062068" officeooo:paragraph-rsid="000c75e0"/>
    </style:style>
    <style:style style:name="P8" style:family="paragraph" style:parent-style-name="Standard">
      <style:text-properties officeooo:rsid="00062068" officeooo:paragraph-rsid="00199ece"/>
    </style:style>
    <style:style style:name="P9" style:family="paragraph" style:parent-style-name="Standard">
      <style:text-properties officeooo:rsid="00062068" officeooo:paragraph-rsid="000a9362"/>
    </style:style>
    <style:style style:name="P10" style:family="paragraph" style:parent-style-name="Standard">
      <style:text-properties officeooo:rsid="00062068" officeooo:paragraph-rsid="00138969"/>
    </style:style>
    <style:style style:name="P11" style:family="paragraph" style:parent-style-name="Standard">
      <style:text-properties officeooo:rsid="00062068" officeooo:paragraph-rsid="00155a9e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cee7a" officeooo:paragraph-rsid="001cee7a" style:font-weight-asian="bold" style:font-weight-complex="bold"/>
    </style:style>
    <style:style style:name="P13" style:family="paragraph" style:parent-style-name="Standard">
      <style:text-properties officeooo:rsid="00062068" officeooo:paragraph-rsid="001cee7a"/>
    </style:style>
    <style:style style:name="P14" style:family="paragraph" style:parent-style-name="Standard">
      <style:text-properties officeooo:rsid="001cee7a" officeooo:paragraph-rsid="001cee7a"/>
    </style:style>
    <style:style style:name="T1" style:family="text">
      <style:text-properties style:text-underline-style="solid" style:text-underline-width="auto" style:text-underline-color="font-color" fo:font-weight="bold" officeooo:rsid="001cee7a" style:font-weight-asian="bold" style:font-weight-complex="bold"/>
    </style:style>
    <style:style style:name="T2" style:family="text">
      <style:text-properties officeooo:rsid="000815ce"/>
    </style:style>
    <style:style style:name="T3" style:family="text">
      <style:text-properties officeooo:rsid="00138969"/>
    </style:style>
    <style:style style:name="T4" style:family="text">
      <style:text-properties officeooo:rsid="000a9362" style:language-complex="he" style:country-complex="IL"/>
    </style:style>
    <style:style style:name="T5" style:family="text">
      <style:text-properties officeooo:rsid="00112eda" style:language-complex="he" style:country-complex="IL"/>
    </style:style>
    <style:style style:name="T6" style:family="text">
      <style:text-properties officeooo:rsid="000c75e0"/>
    </style:style>
    <style:style style:name="T7" style:family="text">
      <style:text-properties officeooo:rsid="00199ece"/>
    </style:style>
    <style:style style:name="T8" style:family="text">
      <style:text-properties officeooo:rsid="00138969" style:language-complex="he" style:country-complex="IL"/>
    </style:style>
    <style:style style:name="T9" style:family="text">
      <style:text-properties officeooo:rsid="00155a9e" style:language-complex="he" style:country-complex="IL"/>
    </style:style>
    <style:style style:name="T10" style:family="text">
      <style:text-properties officeooo:rsid="000815ce" style:language-complex="he" style:country-complex="IL"/>
    </style:style>
    <style:style style:name="T11" style:family="text">
      <style:text-properties style:language-complex="he" style:country-complex="IL"/>
    </style:style>
    <style:style style:name="T12" style:family="text">
      <style:text-properties officeooo:rsid="00174b1a" style:language-complex="he" style:country-complex="IL"/>
    </style:style>
    <style:style style:name="T13" style:family="text">
      <style:text-properties officeooo:rsid="00062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LD</text:span><text:line-break/><text:line-break/>Component name: <text:span text:style-name="T2">Spoti</text:span><text:span text:style-name="T3">f</text:span><text:span text:style-name="T2">y connector</text:span><text:line-break/>High level description: The component takes specific user information (Spotify login), extracts from Spotify the list of song titles, artist/band name, album name, release year, genre from his favorite songs list, and writes the list to the database into a table.</text:p>
      <text:p text:style-name="P2">Inputs: Username and password, or API KEY</text:p>
      <text:p text:style-name="P3">outputs: list of song names</text:p>
      <text:p text:style-name="P4">dependencies: Connecting to Spotifywebsite, connecting to <text:span text:style-name="T4">the </text:span>DB</text:p>
      <text:p text:style-name="P2"/>
      <text:p text:style-name="P2"/>
      <text:p text:style-name="P5">Component name: <text:span text:style-name="T2">Shironet connector</text:span><text:line-break/>High level description: The component receives data that identifies a specific song: song title, singer/band name, album name, release year, genre – <text:span text:style-name="T5">and </text:span>connects to the Shiront website and returns the lyrics.</text:p>
      <text:p text:style-name="P6">Inputs: <text:s/>song title, singer/band name, album name, release year, genre</text:p>
      <text:p text:style-name="P7">outputs: <text:s/>the lyrics <text:span text:style-name="T6">o</text:span>f <text:span text:style-name="T6">the</text:span> song</text:p>
      <text:p text:style-name="P2">dependencies: Connection to the Shiront website, connection to the DB</text:p>
      <text:p text:style-name="P2"/>
      <text:p text:style-name="P2"/>
      <text:p text:style-name="P8">Component name: <text:span text:style-name="T7">genius</text:span><text:span text:style-name="T2"> connector</text:span><text:line-break/>High level description: The component receives data that identifies a specific song: song title, singer/band name, album name, release year, genre – <text:span text:style-name="T5">and </text:span>connects to the <text:span text:style-name="T7">genius</text:span> website and returns the lyrics.</text:p>
      <text:p text:style-name="P6">Inputs: <text:s/>song title, singer/band name, album name, release year, genre</text:p>
      <text:p text:style-name="P7">outputs: the lyrics <text:span text:style-name="T6">o</text:span>f <text:span text:style-name="T6">the</text:span> song</text:p>
      <text:p text:style-name="P9">dependencies: Connection to the <text:span text:style-name="T4">X</text:span> website, connection to the DB</text:p>
      <text:p text:style-name="P2"/>
      <text:p text:style-name="P2"/>
      <text:p text:style-name="P2">Component name: <text:span text:style-name="T2">R</text:span>outer<text:line-break/>High level description: The router receives information about one song, and chooses which of the two authors to direct the request to retrieve the lyrics - Spotify or X.</text:p>
      <text:p text:style-name="P10">inputs: <text:s/>information about one song</text:p>
      <text:p text:style-name="P10">outputs: <text:s/>The name of the connector selected to perform the task.</text:p>
      <text:p text:style-name="P10">Dependencies: <text:s/><text:span text:style-name="T2">Main</text:span><text:span text:style-name="T8">, Connecting to connectors</text:span></text:p>
      <text:p text:style-name="P2"/>
      <text:p text:style-name="P2"/>
      <text:p text:style-name="P11">Component name: <text:span text:style-name="T2">Main</text:span><text:line-break/>High level description: <text:span text:style-name="T8">invokes </text:span><text:span text:style-name="T9">s</text:span><text:span text:style-name="T10">poti</text:span><text:span text:style-name="T8">f</text:span><text:span text:style-name="T10">y connector </text:span><text:span text:style-name="T9">with the </text:span><text:span text:style-name="T11">user information, </text:span><text:span text:style-name="T9">getting the songs data from the DB, send one song at a time to the router to get the lyrics</text:span></text:p>
      <text:p text:style-name="P11">inputs: <text:span text:style-name="T11">user information</text:span></text:p>
      <text:p text:style-name="P11">outputs: <text:span text:style-name="T9">lyrics </text:span><text:span text:style-name="T12">for all songs</text:span></text:p>
      <text:p text:style-name="P2">dependencies: Connection to DB, connection to router</text:p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LLD</text:p>
      <text:p text:style-name="P12"/>
      <text:p text:style-name="P13">Component name: <text:span text:style-name="T2">Spoti</text:span><text:span text:style-name="T3">f</text:span><text:span text:style-name="T2">y connector</text:span><text:line-break/>High level description: The component takes specific user information (Spotify login), extracts from Spotify the list of song titles, artist/band name, album name, release year, genre from his favorite songs list, and writes the list to the database into a table.</text:p>
      <text:p text:style-name="P13">Inputs: Username and password, or API KEY</text:p>
      <text:p text:style-name="P13">outputs: list of song names</text:p>
      <text:p text:style-name="P13">dependencies: Connecting to Spotifywebsite, connecting to <text:span text:style-name="T4">the </text:span>DB</text:p>
      <text:p text:style-name="P13"/>
      <text:p text:style-name="P14">flow:</text:p>
      <text:p text:style-name="P14">1. Getting login details from the user and connecting to their Spotify account</text:p>
      <text:p text:style-name="P14">2. Go to <text:span text:style-name="T11">liked</text:span> songs</text:p>
      <text:p text:style-name="P14">3. Copying song titles</text:p>
      <text:p text:style-name="P14">4. For each song getting: <text:s/><text:span text:style-name="T13">artist/band name, album name, release year, genre</text:span></text:p>
      <text:p text:style-name="P14">5. Recording all the data about the song to the database, the primary key will be the song name I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0T22:04:11.566390500</meta:creation-date>
    <dc:date>2026-05-10T23:09:40.824590500</dc:date>
    <meta:editing-duration>PT48M24S</meta:editing-duration>
    <meta:editing-cycles>12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31" meta:word-count="410" meta:character-count="2614" meta:non-whitespace-character-count="2225"/>
  </office:meta>
</office:document-meta>
</file>